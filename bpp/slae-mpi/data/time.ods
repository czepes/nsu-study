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time" table:style-name="ta1">
        <table:shapes>
          <draw:frame draw:z-index="0" draw:style-name="gr1" draw:text-style-name="P1" svg:width="7.3087in" svg:height="4.1134in" svg:x="4.513in" svg:y="0.1047in">
            <draw:object draw:notify-on-update-of-ranges="time.A2:time.A6 time.B1:time.B1 time.B2:time.B6 time.E1:time.E1 time.E2:time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cpus</text:p>
          </table:table-cell>
          <table:table-cell table:number-columns-repeated="3" office:value-type="string" calcext:value-type="string">
            <text:p>Последовательная</text:p>
          </table:table-cell>
          <table:table-cell table:number-columns-repeated="3" office:value-type="string" calcext:value-type="string">
            <text:p>Параллельная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.8543" calcext:value-type="float">
            <text:p>45.854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3.5103" calcext:value-type="float">
            <text:p>23.5103</text:p>
          </table:table-cell>
          <table:table-cell table:formula="of:= [.B2] / [.E2]" office:value-type="float" office:value="1.95039195586615" calcext:value-type="float">
            <text:p>1.95039195586615</text:p>
          </table:table-cell>
          <table:table-cell table:formula="of:= [.F2] / [.A2] * 100" office:value-type="float" office:value="97.5195977933076" calcext:value-type="float">
            <text:p>97.519597793307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.8543" calcext:value-type="float">
            <text:p>45.854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3.936" calcext:value-type="float">
            <text:p>13.936</text:p>
          </table:table-cell>
          <table:table-cell table:formula="of:= [.B3] / [.E3]" office:value-type="float" office:value="3.29034873708381" calcext:value-type="float">
            <text:p>3.29034873708381</text:p>
          </table:table-cell>
          <table:table-cell table:formula="of:= [.F3] / [.A3] * 100" office:value-type="float" office:value="82.2587184270953" calcext:value-type="float">
            <text:p>82.258718427095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.8543" calcext:value-type="float">
            <text:p>45.8543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11.0806" calcext:value-type="float">
            <text:p>11.0806</text:p>
          </table:table-cell>
          <table:table-cell table:formula="of:= [.B4] / [.E4]" office:value-type="float" office:value="4.13825063624713" calcext:value-type="float">
            <text:p>4.13825063624713</text:p>
          </table:table-cell>
          <table:table-cell table:formula="of:= [.F4] / [.A4] * 100" office:value-type="float" office:value="51.7281329530892" calcext:value-type="float">
            <text:p>51.7281329530892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.8543" calcext:value-type="float">
            <text:p>45.8543</text:p>
          </table:table-cell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6.25</text:p>
          </table:table-cell>
          <table:table-cell office:value-type="float" office:value="8.357" calcext:value-type="float">
            <text:p>8.357</text:p>
          </table:table-cell>
          <table:table-cell table:formula="of:= [.B5] / [.E5]" office:value-type="float" office:value="5.48693310996769" calcext:value-type="float">
            <text:p>5.48693310996769</text:p>
          </table:table-cell>
          <table:table-cell table:formula="of:= [.F5] / [.A5] * 100" office:value-type="float" office:value="34.2933319372981" calcext:value-type="float">
            <text:p>34.2933319372981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.8543" calcext:value-type="float">
            <text:p>45.8543</text:p>
          </table:table-cell>
          <table:table-cell office:value-type="float" office:value="1" calcext:value-type="float">
            <text:p>1</text:p>
          </table:table-cell>
          <table:table-cell office:value-type="float" office:value="4.1666" calcext:value-type="float">
            <text:p>4.1666</text:p>
          </table:table-cell>
          <table:table-cell office:value-type="float" office:value="5.8292" calcext:value-type="float">
            <text:p>5.8292</text:p>
          </table:table-cell>
          <table:table-cell table:formula="of:= [.B6] / [.E6]" office:value-type="float" office:value="7.86631098607013" calcext:value-type="float">
            <text:p>7.86631098607013</text:p>
          </table:table-cell>
          <table:table-cell table:formula="of:= [.F6] / [.A6] * 100" office:value-type="float" office:value="32.7762957752922" calcext:value-type="float">
            <text:p>32.7762957752922</text:p>
          </table:table-cell>
          <table:table-cell table:number-columns-repeated="9"/>
        </table:table-row>
        <table:table-row table:style-name="ro1" table:number-rows-repeated="17">
          <table:table-cell table:number-columns-repeated="16"/>
        </table:table-row>
        <table:table-row table:style-name="ro1">
          <table:table-cell table:number-columns-repeated="15"/>
          <table:table-cell>
            <draw:frame draw:z-index="2" draw:style-name="gr1" draw:text-style-name="P1" svg:width="7.3268in" svg:height="4.1205in" svg:x="0.4831in" svg:y="0.1673in">
              <draw:object draw:notify-on-update-of-ranges="time.D1:time.D1 time.D2:time.D6 time.G1:time.G1 time.G2:time.G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number-columns-repeated="7"/>
          <table:table-cell>
            <draw:frame draw:z-index="1" draw:style-name="gr1" draw:text-style-name="P1" svg:width="7.2728in" svg:height="4.089in" svg:x="0.1268in" svg:y="0.0524in">
              <draw:object draw:notify-on-update-of-ranges="time.A2:time.A6 time.C1:time.C1 time.C2:time.C6 time.F1:time.F1 time.F2:time.F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4">00/00/0000</text:date>, <text:time style:data-style-name="N2" text:time-value="12:43:24.2719039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14T12:49:48.834767971</dc:date>
    <meta:editing-duration>PT41M21S</meta:editing-duration>
    <meta:editing-cycles>6</meta:editing-cycles>
    <meta:generator>LibreOffice/26.2.1.2$Linux_X86_64 LibreOffice_project/620$Build-2</meta:generator>
    <meta:document-statistic meta:table-count="1" meta:cell-count="42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9pt" style:font-size-complex="9pt"/>
    </style:style>
  </office:automatic-styles>
  <office:body>
    <office:chart>
      <chart:chart svg:width="18.565cm" svg:height="10.449cm" xlink:href=".." xlink:type="simple" chart:class="chart:line" chart:style-name="ch1">
        <chart:title svg:x="6.114cm" svg:y="0.344cm" chart:style-name="ch2">
          <text:p>График времени выполнения</text:p>
        </chart:title>
        <chart:legend chart:legend-position="top" svg:x="5.435cm" svg:y="1.308cm" style:legend-expansion="wide" chart:style-name="ch3"/>
        <chart:plot-area chart:style-name="ch4" svg:x="1.504cm" svg:y="2.114cm" svg:width="16.69cm" svg:height="7.024cm">
          <chart:coordinate-region svg:x="2.138cm" svg:y="2.313cm" svg:width="15.863cm" svg:height="6.178cm"/>
          <chart:axis chart:dimension="x" chart:name="primary-x" chart:style-name="ch5" chartooo:axis-type="auto">
            <chartooo:date-scale/>
            <chart:title svg:x="8.189cm" svg:y="9.346cm" chart:style-name="ch2">
              <text:p><text:span text:style-name="T1">Число процессов</text:span></text:p>
            </chart:title>
            <chart:categories table:cell-range-address="time.A2:time.A6"/>
          </chart:axis>
          <chart:axis chart:dimension="y" chart:name="primary-y" chart:style-name="ch5">
            <chart:title svg:x="0.451cm" svg:y="8.352cm" chart:style-name="ch6">
              <text:p><text:span text:style-name="T1">Время выполнения, секунды</text:span></text:p>
            </chart:title>
            <chart:grid chart:style-name="ch7" chart:class="major"/>
          </chart:axis>
          <chart:series chart:style-name="ch8" chart:values-cell-range-address="time.B2:time.B6" chart:label-cell-address="time.B1:time.B1" chart:class="chart:line">
            <chart:data-point chart:repeated="5"/>
          </chart:series>
          <chart:series chart:style-name="ch9" chart:values-cell-range-address="time.E2:time.E6" chart:label-cell-address="time.E1:time.E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следовательная</text:p>
                <draw:g>
                  <svg:desc>time.B1:time.B1</svg:desc>
                </draw:g>
              </table:table-cell>
              <table:table-cell office:value-type="string">
                <text:p>Параллельная</text:p>
                <draw:g>
                  <svg:desc>time.E1:time.E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time.A2:time.A6</svg:desc>
                </draw:g>
              </table:table-cell>
              <table:table-cell office:value-type="float" office:value="45.8543">
                <text:p>45.8543</text:p>
                <draw:g>
                  <svg:desc>time.B2:time.B6</svg:desc>
                </draw:g>
              </table:table-cell>
              <table:table-cell office:value-type="float" office:value="23.5103">
                <text:p>23.5103</text:p>
                <draw:g>
                  <svg:desc>time.E2:time.E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5.8543">
                <text:p>45.8543</text:p>
              </table:table-cell>
              <table:table-cell office:value-type="float" office:value="13.936">
                <text:p>13.93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5.8543">
                <text:p>45.8543</text:p>
              </table:table-cell>
              <table:table-cell office:value-type="float" office:value="11.0806">
                <text:p>11.080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5.8543">
                <text:p>45.8543</text:p>
              </table:table-cell>
              <table:table-cell office:value-type="float" office:value="8.357">
                <text:p>8.35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5.8543">
                <text:p>45.8543</text:p>
              </table:table-cell>
              <table:table-cell office:value-type="float" office:value="5.8292">
                <text:p>5.82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11pt" style:font-size-asian="9pt" style:font-size-complex="9pt"/>
    </style:style>
    <style:style style:name="T3" style:family="text">
      <style:text-properties style:text-position="0% 100%" fo:font-size="11pt" style:letter-kerning="false" style:font-size-asian="9pt" style:font-size-complex="9pt"/>
    </style:style>
  </office:automatic-styles>
  <office:body>
    <office:chart>
      <chart:chart svg:width="18.474cm" svg:height="10.387cm" xlink:href=".." xlink:type="simple" chart:class="chart:line" chart:style-name="ch1">
        <chart:title svg:x="5.898cm" svg:y="0.343cm" chart:style-name="ch2">
          <text:p><text:span text:style-name="T1">График ускорения выполнения</text:span></text:p>
        </chart:title>
        <chart:legend chart:legend-position="top" svg:x="5.39cm" svg:y="1.307cm" style:legend-expansion="wide" chart:style-name="ch3"/>
        <chart:plot-area chart:style-name="ch4" svg:x="1.502cm" svg:y="2.112cm" svg:width="16.603cm" svg:height="6.965cm">
          <chart:coordinate-region svg:x="1.944cm" svg:y="2.311cm" svg:width="15.968cm" svg:height="6.119cm"/>
          <chart:axis chart:dimension="x" chart:name="primary-x" chart:style-name="ch5" chartooo:axis-type="auto">
            <chartooo:date-scale/>
            <chart:title svg:x="8.143cm" svg:y="9.284cm" chart:style-name="ch2">
              <text:p><text:span text:style-name="T2">Число процессов</text:span></text:p>
            </chart:title>
            <chart:categories table:cell-range-address="time.A2:time.A6"/>
          </chart:axis>
          <chart:axis chart:dimension="y" chart:name="primary-y" chart:style-name="ch5">
            <chart:title svg:x="0.451cm" svg:y="7.964cm" chart:style-name="ch6">
              <text:p><text:span text:style-name="T3">Коэффициент ускорения</text:span></text:p>
            </chart:title>
            <chart:grid chart:style-name="ch7" chart:class="major"/>
          </chart:axis>
          <chart:series chart:style-name="ch8" chart:values-cell-range-address="time.C2:time.C6" chart:label-cell-address="time.C1:time.C1" chart:class="chart:line">
            <chart:data-point chart:repeated="5"/>
          </chart:series>
          <chart:series chart:style-name="ch9" chart:values-cell-range-address="time.F2:time.F6" chart:label-cell-address="time.F1:time.F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следовательная</text:p>
                <draw:g>
                  <svg:desc>time.C1:time.C1</svg:desc>
                </draw:g>
              </table:table-cell>
              <table:table-cell office:value-type="string">
                <text:p>Параллельная</text:p>
                <draw:g>
                  <svg:desc>time.F1:time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time.A2:time.A6</svg:desc>
                </draw:g>
              </table:table-cell>
              <table:table-cell office:value-type="float" office:value="1">
                <text:p>1</text:p>
                <draw:g>
                  <svg:desc>time.C2:time.C6</svg:desc>
                </draw:g>
              </table:table-cell>
              <table:table-cell office:value-type="float" office:value="1.95039195586615">
                <text:p>1.95039195586615</text:p>
                <draw:g>
                  <svg:desc>time.F2:time.F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.29034873708381">
                <text:p>3.2903487370838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.13825063624713">
                <text:p>4.138250636247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5.48693310996769">
                <text:p>5.4869331099676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.86631098607013">
                <text:p>7.866310986070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11pt" style:font-size-asian="9pt" style:font-size-complex="9pt"/>
    </style:style>
    <style:style style:name="T3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8.611cm" svg:height="10.467cm" xlink:href=".." xlink:type="simple" chart:class="chart:line" chart:style-name="ch1">
        <chart:title svg:x="4.549cm" svg:y="0.345cm" chart:style-name="ch2">
          <text:p><text:span text:style-name="T1">График эффективности распараллеливания</text:span></text:p>
        </chart:title>
        <chart:legend chart:legend-position="top" svg:x="5.458cm" svg:y="1.309cm" style:legend-expansion="wide" chart:style-name="ch3"/>
        <chart:plot-area chart:style-name="ch4" svg:x="1.383cm" svg:y="2.116cm" svg:width="16.856cm" svg:height="7.039cm">
          <chart:coordinate-region svg:x="2.208cm" svg:y="2.315cm" svg:width="15.934cm" svg:height="6.193cm"/>
          <chart:axis chart:dimension="x" chart:name="primary-x" chart:style-name="ch5">
            <chart:title svg:x="8.151cm" svg:y="9.364cm" chart:style-name="ch2">
              <text:p><text:span text:style-name="T2">Число процессов</text:span></text:p>
            </chart:title>
          </chart:axis>
          <chart:axis chart:dimension="y" chart:name="primary-y" chart:style-name="ch5">
            <chart:title svg:x="0.451cm" svg:y="9.086cm" chart:style-name="ch6">
              <text:p><text:span text:style-name="T3">Эффективность использования процессов, %</text:span></text:p>
            </chart:title>
            <chart:grid chart:style-name="ch7" chart:class="major"/>
          </chart:axis>
          <chart:series chart:style-name="ch8" chart:values-cell-range-address="time.D2:time.D6" chart:label-cell-address="time.D1:time.D1" chart:class="chart:line">
            <chart:data-point chart:repeated="5"/>
          </chart:series>
          <chart:series chart:style-name="ch9" chart:values-cell-range-address="time.G2:time.G6" chart:label-cell-address="time.G1:time.G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следовательная</text:p>
                <draw:g>
                  <svg:desc>time.D1:time.D1</svg:desc>
                </draw:g>
              </table:table-cell>
              <table:table-cell office:value-type="string">
                <text:p>Параллельная</text:p>
                <draw:g>
                  <svg:desc>time.G1:tim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ime.D2:time.D6</svg:desc>
                </draw:g>
              </table:table-cell>
              <table:table-cell office:value-type="float" office:value="97.5195977933076">
                <text:p>97.5195977933076</text:p>
                <draw:g>
                  <svg:desc>time.G2:time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82.2587184270953">
                <text:p>82.25871842709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5">
                <text:p>12.5</text:p>
              </table:table-cell>
              <table:table-cell office:value-type="float" office:value="51.7281329530892">
                <text:p>51.7281329530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5">
                <text:p>6.25</text:p>
              </table:table-cell>
              <table:table-cell office:value-type="float" office:value="34.2933319372981">
                <text:p>34.2933319372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666">
                <text:p>4.1666</text:p>
              </table:table-cell>
              <table:table-cell office:value-type="float" office:value="32.7762957752922">
                <text:p>32.77629577529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