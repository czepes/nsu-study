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10000000000002E9000001A5BC5F5132.png" manifest:media-type="image/png"/>
  <manifest:file-entry manifest:full-path="Object 5/Pictures/2000000600004CE900002B68FA3B08D2.svm" manifest:media-type="image/x-svm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2000000600004CE800002B61D75C6A01.svm" manifest:media-type="image/x-svm"/>
  <manifest:file-entry manifest:full-path="Object 6/Pictures/10000000000002E9000001A5BC5F5132.png" manifest:media-type="image/png"/>
  <manifest:file-entry manifest:full-path="Object 6/Pictures/2000000600004CE900002B68FA3B08D2.svm" manifest:media-type="image/x-svm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600004CE800002B61D75C6A01.svm" manifest:media-type="image/x-svm"/>
  <manifest:file-entry manifest:full-path="Object 3/Pictures/10000000000002E9000001A5BC5F5132.png" manifest:media-type="image/png"/>
  <manifest:file-entry manifest:full-path="Object 3/Pictures/2000000600004CE900002B68FA3B08D2.svm" manifest:media-type="image/x-svm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000000002E9000001A5BC5F5132.png" manifest:media-type="image/png"/>
  <manifest:file-entry manifest:full-path="Object 2/Pictures/2000000600004CE900002B68FA3B08D2.svm" manifest:media-type="image/x-svm"/>
  <manifest:file-entry manifest:full-path="Object 2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7.7941in" svg:height="4.4024in" svg:x="6.1028in" svg:y="0.4602in">
            <draw:object draw:notify-on-update-of-ranges="Sheet1.A2:Sheet1.A7 Sheet1.D1:Sheet1.D1 Sheet1.D2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7508in" svg:height="4.374in" svg:x="6.1031in" svg:y="4.9146in">
            <draw:object draw:notify-on-update-of-ranges="Sheet1.A2:Sheet1.A7 Sheet1.E1:Sheet1.E1 Sheet1.E2:Sheet1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eff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.047" calcext:value-type="float">
            <text:p>71.047</text:p>
          </table:table-cell>
          <table:table-cell office:value-type="float" office:value="1" calcext:value-type="float">
            <text:p>1</text:p>
          </table:table-cell>
          <table:table-cell office:value-type="float" office:value="71.047" calcext:value-type="float">
            <text:p>71.047</text:p>
          </table:table-cell>
          <table:table-cell table:formula="of:= [.B2] / [.D2]" office:value-type="float" office:value="1" calcext:value-type="float">
            <text:p>1</text:p>
          </table:table-cell>
          <table:table-cell table:formula="of:= [.E2] / [.A2] * 100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047" calcext:value-type="float">
            <text:p>71.047</text:p>
          </table:table-cell>
          <table:table-cell office:value-type="float" office:value="1" calcext:value-type="float">
            <text:p>1</text:p>
          </table:table-cell>
          <table:table-cell office:value-type="float" office:value="29.739" calcext:value-type="float">
            <text:p>29.739</text:p>
          </table:table-cell>
          <table:table-cell table:formula="of:= [.B3] / [.D3]" office:value-type="float" office:value="2.38901778808971" calcext:value-type="float">
            <text:p>2.38901778808971</text:p>
          </table:table-cell>
          <table:table-cell table:formula="of:= [.E3] / [.A3] * 100" office:value-type="float" office:value="119.450889404486" calcext:value-type="float">
            <text:p>119.450889404486</text:p>
          </table:table-cell>
          <table:table-cell table:number-columns-repeated="9"/>
          <table:table-cell>
            <draw:frame draw:z-index="3" draw:style-name="gr1" draw:text-style-name="P1" svg:width="7.7941in" svg:height="4.4024in" svg:x="0.6291in" svg:y="-0.0004in">
              <draw:object draw:notify-on-update-of-ranges="Sheet1.A10:Sheet1.A15 Sheet1.D9:Sheet1.D9 Sheet1.D10:Sheet1.D1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.047" calcext:value-type="float">
            <text:p>71.047</text:p>
          </table:table-cell>
          <table:table-cell office:value-type="float" office:value="1" calcext:value-type="float">
            <text:p>1</text:p>
          </table:table-cell>
          <table:table-cell office:value-type="float" office:value="19.151" calcext:value-type="float">
            <text:p>19.151</text:p>
          </table:table-cell>
          <table:table-cell table:formula="of:= [.B4] / [.D4]" office:value-type="float" office:value="3.70983238473187" calcext:value-type="float">
            <text:p>3.70983238473187</text:p>
          </table:table-cell>
          <table:table-cell table:formula="of:= [.E4] / [.A4] * 100" office:value-type="float" office:value="92.7458096182967" calcext:value-type="float">
            <text:p>92.745809618296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.047" calcext:value-type="float">
            <text:p>71.047</text:p>
          </table:table-cell>
          <table:table-cell office:value-type="float" office:value="1" calcext:value-type="float">
            <text:p>1</text:p>
          </table:table-cell>
          <table:table-cell office:value-type="float" office:value="16.279" calcext:value-type="float">
            <text:p>16.279</text:p>
          </table:table-cell>
          <table:table-cell table:formula="of:= [.B5] / [.D5]" office:value-type="float" office:value="4.36433441857608" calcext:value-type="float">
            <text:p>4.36433441857608</text:p>
          </table:table-cell>
          <table:table-cell table:formula="of:= [.E5] / [.A5] * 100" office:value-type="float" office:value="54.554180232201" calcext:value-type="float">
            <text:p>54.55418023220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.047" calcext:value-type="float">
            <text:p>71.047</text:p>
          </table:table-cell>
          <table:table-cell office:value-type="float" office:value="1" calcext:value-type="float">
            <text:p>1</text:p>
          </table:table-cell>
          <table:table-cell office:value-type="float" office:value="11.998" calcext:value-type="float">
            <text:p>11.998</text:p>
          </table:table-cell>
          <table:table-cell table:formula="of:= [.B6] / [.D6]" office:value-type="float" office:value="5.92157026171029" calcext:value-type="float">
            <text:p>5.92157026171029</text:p>
          </table:table-cell>
          <table:table-cell table:formula="of:= [.E6] / [.A6] * 100" office:value-type="float" office:value="37.0098141356893" calcext:value-type="float">
            <text:p>37.0098141356893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1.047" calcext:value-type="float">
            <text:p>71.047</text:p>
          </table:table-cell>
          <table:table-cell office:value-type="float" office:value="1" calcext:value-type="float">
            <text:p>1</text:p>
          </table:table-cell>
          <table:table-cell office:value-type="float" office:value="8.247" calcext:value-type="float">
            <text:p>8.247</text:p>
          </table:table-cell>
          <table:table-cell table:formula="of:= [.B7] / [.D7]" office:value-type="float" office:value="8.61489026312599" calcext:value-type="float">
            <text:p>8.61489026312599</text:p>
          </table:table-cell>
          <table:table-cell table:formula="of:= [.E7] / [.A7] * 100" office:value-type="float" office:value="35.8953760963583" calcext:value-type="float">
            <text:p>35.8953760963583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eff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.116" calcext:value-type="float">
            <text:p>22.116</text:p>
          </table:table-cell>
          <table:table-cell office:value-type="float" office:value="1" calcext:value-type="float">
            <text:p>1</text:p>
          </table:table-cell>
          <table:table-cell office:value-type="float" office:value="22.116" calcext:value-type="float">
            <text:p>22.116</text:p>
          </table:table-cell>
          <table:table-cell table:formula="of:= [.B10] / [.D10]" office:value-type="float" office:value="1" calcext:value-type="float">
            <text:p>1</text:p>
          </table:table-cell>
          <table:table-cell table:formula="of:= [.E10] / [.A10] * 100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116" calcext:value-type="float">
            <text:p>22.116</text:p>
          </table:table-cell>
          <table:table-cell office:value-type="float" office:value="1" calcext:value-type="float">
            <text:p>1</text:p>
          </table:table-cell>
          <table:table-cell office:value-type="float" office:value="11.209" calcext:value-type="float">
            <text:p>11.209</text:p>
          </table:table-cell>
          <table:table-cell table:formula="of:= [.B11] / [.D11]" office:value-type="float" office:value="1.97305736461772" calcext:value-type="float">
            <text:p>1.97305736461772</text:p>
          </table:table-cell>
          <table:table-cell table:formula="of:= [.E11] / [.A11] * 100" office:value-type="float" office:value="98.6528682308859" calcext:value-type="float">
            <text:p>98.652868230885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116" calcext:value-type="float">
            <text:p>22.116</text:p>
          </table:table-cell>
          <table:table-cell office:value-type="float" office:value="1" calcext:value-type="float">
            <text:p>1</text:p>
          </table:table-cell>
          <table:table-cell office:value-type="float" office:value="5.753" calcext:value-type="float">
            <text:p>5.753</text:p>
          </table:table-cell>
          <table:table-cell table:formula="of:= [.B12] / [.D12]" office:value-type="float" office:value="3.84425517121502" calcext:value-type="float">
            <text:p>3.84425517121502</text:p>
          </table:table-cell>
          <table:table-cell table:formula="of:= [.E12] / [.A12] * 100" office:value-type="float" office:value="96.1063792803755" calcext:value-type="float">
            <text:p>96.106379280375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116" calcext:value-type="float">
            <text:p>22.116</text:p>
          </table:table-cell>
          <table:table-cell office:value-type="float" office:value="1" calcext:value-type="float">
            <text:p>1</text:p>
          </table:table-cell>
          <table:table-cell office:value-type="float" office:value="3.072" calcext:value-type="float">
            <text:p>3.072</text:p>
          </table:table-cell>
          <table:table-cell table:formula="of:= [.B13] / [.D13]" office:value-type="float" office:value="7.19921875" calcext:value-type="float">
            <text:p>7.19921875</text:p>
          </table:table-cell>
          <table:table-cell table:formula="of:= [.E13] / [.A13] * 100" office:value-type="float" office:value="89.990234375" calcext:value-type="float">
            <text:p>89.99023437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116" calcext:value-type="float">
            <text:p>22.116</text:p>
          </table:table-cell>
          <table:table-cell office:value-type="float" office:value="1" calcext:value-type="float">
            <text:p>1</text:p>
          </table:table-cell>
          <table:table-cell office:value-type="float" office:value="1.651" calcext:value-type="float">
            <text:p>1.651</text:p>
          </table:table-cell>
          <table:table-cell table:formula="of:= [.B14] / [.D14]" office:value-type="float" office:value="13.3955178679588" calcext:value-type="float">
            <text:p>13.3955178679588</text:p>
          </table:table-cell>
          <table:table-cell table:formula="of:= [.E14] / [.A14] * 100" office:value-type="float" office:value="83.7219866747426" calcext:value-type="float">
            <text:p>83.7219866747426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.116" calcext:value-type="float">
            <text:p>22.116</text:p>
          </table:table-cell>
          <table:table-cell office:value-type="float" office:value="1" calcext:value-type="float">
            <text:p>1</text:p>
          </table:table-cell>
          <table:table-cell office:value-type="float" office:value="1.181" calcext:value-type="float">
            <text:p>1.181</text:p>
          </table:table-cell>
          <table:table-cell table:formula="of:= [.B15] / [.D15]" office:value-type="float" office:value="18.7265029635902" calcext:value-type="float">
            <text:p>18.7265029635902</text:p>
          </table:table-cell>
          <table:table-cell table:formula="of:= [.E15] / [.A15] * 100" office:value-type="float" office:value="78.0270956816258" calcext:value-type="float">
            <text:p>78.0270956816258</text:p>
          </table:table-cell>
          <table:table-cell table:number-columns-repeated="10"/>
        </table:table-row>
        <table:table-row table:style-name="ro1" table:number-rows-repeated="12">
          <table:table-cell table:number-columns-repeated="16"/>
        </table:table-row>
        <table:table-row table:style-name="ro1">
          <table:table-cell table:number-columns-repeated="15"/>
          <table:table-cell>
            <draw:frame draw:z-index="4" draw:style-name="gr1" draw:text-style-name="P1" svg:width="7.7508in" svg:height="4.374in" svg:x="0.5961in" svg:y="0.0102in">
              <draw:object draw:notify-on-update-of-ranges="Sheet1.A10:Sheet1.A15 Sheet1.E9:Sheet1.E9 Sheet1.E10:Sheet1.E1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number-columns-repeated="6"/>
          <table:table-cell>
            <draw:frame draw:z-index="2" draw:style-name="gr1" draw:text-style-name="P1" svg:width="7.7504in" svg:height="4.3713in" svg:x="0.813in" svg:y="0.0937in">
              <draw:object draw:notify-on-update-of-ranges="Sheet1.A2:Sheet1.A7 Sheet1.F1:Sheet1.F1 Sheet1.F2:Sheet1.F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>
            <draw:frame draw:z-index="5" draw:style-name="gr1" draw:text-style-name="P1" svg:width="7.7508in" svg:height="4.3713in" svg:x="0.5528in" svg:y="-0.0004in">
              <draw:object draw:notify-on-update-of-ranges="Sheet1.A10:Sheet1.A15 Sheet1.F9:Sheet1.F9 Sheet1.F10:Sheet1.F1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/00/0000</text:date>, <text:time style:data-style-name="N2" text:time-value="12:16:52.7638124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00:20:10.582702522</meta:creation-date>
    <dc:date>2026-05-02T12:18:45.845400306</dc:date>
    <meta:editing-duration>PT1H56M41S</meta:editing-duration>
    <meta:editing-cycles>6</meta:editing-cycles>
    <meta:generator>LibreOffice/26.2.2.2$Linux_X86_64 LibreOffice_project/620$Build-2</meta:generator>
    <meta:document-statistic meta:table-count="1" meta:cell-count="84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14pt"/>
    </style:style>
    <style:style style:name="T2" style:family="text">
      <style:text-properties fo:font-size="12pt" style:font-size-asian="9pt" style:font-size-complex="9pt"/>
    </style:style>
    <style:style style:name="T3" style:family="text">
      <style:text-properties style:text-position="0% 100%" fo:font-size="12pt" style:letter-kerning="false" style:font-size-asian="9pt" style:font-size-complex="9pt"/>
    </style:style>
  </office:automatic-styles>
  <office:body>
    <office:chart>
      <chart:chart svg:width="19.798cm" svg:height="11.183cm" xlink:href=".." xlink:type="simple" chart:class="chart:line" chart:style-name="ch1">
        <chart:title svg:x="6.41cm" svg:y="0.358cm" chart:style-name="ch2">
          <text:p><text:span text:style-name="T1">График времени исполнения</text:span></text:p>
        </chart:title>
        <chart:plot-area chart:style-name="ch3" svg:x="1.55cm" svg:y="1.434cm" svg:width="17.853cm" svg:height="8.401cm">
          <chart:coordinate-region svg:x="2.184cm" svg:y="1.633cm" svg:width="17.027cm" svg:height="7.555cm"/>
          <chart:axis chart:dimension="x" chart:name="primary-x" chart:style-name="ch4" chartooo:axis-type="auto">
            <chartooo:date-scale/>
            <chart:title svg:x="8.704cm" svg:y="10.058cm" chart:style-name="ch2">
              <text:p><text:span text:style-name="T2">Число процессов</text:span></text:p>
            </chart:title>
            <chart:categories table:cell-range-address="Sheet1.A2:Sheet1.A7"/>
          </chart:axis>
          <chart:axis chart:dimension="y" chart:name="primary-y" chart:style-name="ch4">
            <chart:title svg:x="0.451cm" svg:y="8.502cm" chart:style-name="ch5">
              <text:p><text:span text:style-name="T3">Время исполнения, секунды</text:span></text:p>
            </chart:title>
            <chart:grid chart:style-name="ch6" chart:class="major"/>
          </chart:axis>
          <chart:series chart:style-name="ch7" chart:values-cell-range-address="Sheet1.D2:Sheet1.D7" chart:label-cell-address="Sheet1.D1:Sheet1.D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71.047">
                <text:p>71.047</text:p>
                <draw:g>
                  <svg:desc>Sheet1.D2:Sheet1.D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9.739">
                <text:p>29.7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51">
                <text:p>19.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.279">
                <text:p>16.2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98">
                <text:p>11.99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.247">
                <text:p>8.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  <style:style style:name="T1" style:family="text">
      <style:text-properties style:text-position="0% 100%" fo:font-size="14pt" style:letter-kerning="false"/>
    </style:style>
    <style:style style:name="T2" style:family="text">
      <style:text-properties fo:font-size="12pt" style:font-size-asian="9pt" style:font-size-complex="9pt"/>
    </style:style>
    <style:style style:name="T3" style:family="text">
      <style:text-properties style:text-position="0% 100%" fo:font-size="12pt" style:letter-kerning="false" style:font-size-asian="9pt" style:font-size-complex="9pt"/>
    </style:style>
  </office:automatic-styles>
  <office:body>
    <office:chart>
      <chart:chart svg:width="19.688cm" svg:height="11.111cm" xlink:href=".." xlink:type="simple" chart:class="chart:line" chart:style-name="ch1">
        <chart:title svg:x="6.094cm" svg:y="0.357cm" chart:style-name="ch2">
          <text:p><text:span text:style-name="T1">График ускорения исполнения </text:span></text:p>
        </chart:title>
        <chart:plot-area chart:style-name="ch3" svg:x="1.548cm" svg:y="1.432cm" svg:width="17.747cm" svg:height="8.332cm">
          <chart:coordinate-region svg:x="2.182cm" svg:y="1.631cm" svg:width="16.92cm" svg:height="7.486cm"/>
          <chart:axis chart:dimension="x" chart:name="primary-x" chart:style-name="ch4" chartooo:axis-type="auto">
            <chartooo:date-scale/>
            <chart:title svg:x="8.649cm" svg:y="9.986cm" chart:style-name="ch2">
              <text:p><text:span text:style-name="T2">Число процессов</text:span></text:p>
            </chart:title>
            <chart:categories table:cell-range-address="Sheet1.A2:Sheet1.A7"/>
          </chart:axis>
          <chart:axis chart:dimension="y" chart:name="primary-y" chart:style-name="ch4">
            <chart:title svg:x="0.451cm" svg:y="9.442cm" chart:style-name="ch5">
              <text:p><text:span text:style-name="T3">Коэффикциент ускорения исполнения</text:span></text:p>
            </chart:title>
            <chart:grid chart:style-name="ch6" chart:class="major"/>
          </chart:axis>
          <chart:series chart:style-name="ch7" chart:values-cell-range-address="Sheet1.E2:Sheet1.E7" chart:label-cell-address="Sheet1.E1:Sheet1.E1" chart:class="chart:line">
            <chart:data-point chart:repeated="6"/>
          </chart:series>
          <chart:wall chart:style-name="ch8"/>
          <chart:floor chart:style-name="ch9"/>
        </chart:plot-area>
        <draw:frame draw:style-name="gr1" draw:text-style-name="P1" svg:width="1cm" svg:height="1cm" svg:x="0cm" svg:y="0cm">
          <draw:image xlink:href="Pictures/2000000600004CE900002B68FA3B08D2.svm" xlink:type="simple" xlink:show="embed" xlink:actuate="onLoad" draw:mime-type="image/x-svm">
            <text:p/>
          </draw:image>
          <draw:image xlink:href="Pictures/10000000000002E9000001A5BC5F5132.png" xlink:type="simple" xlink:show="embed" xlink:actuate="onLoad" draw:mime-type="image/png"/>
        </draw:frame>
        <draw:frame draw:style-name="gr1" draw:text-style-name="P2" svg:width="1cm" svg:height="1cm" svg:x="0cm" svg:y="0cm">
          <draw:image xlink:href="Pictures/2000000600004CE900002B68FA3B08D2.svm" xlink:type="simple" xlink:show="embed" xlink:actuate="onLoad" draw:mime-type="image/x-svm">
            <text:p/>
          </draw:image>
          <draw:image xlink:href="Pictures/10000000000002E9000001A5BC5F5132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1">
                <text:p>1</text:p>
                <draw:g>
                  <svg:desc>Sheet1.E2:Sheet1.E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38901778808971">
                <text:p>2.389017788089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70983238473187">
                <text:p>3.709832384731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36433441857608">
                <text:p>4.364334418576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92157026171029">
                <text:p>5.9215702617102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.61489026312599">
                <text:p>8.614890263125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  <style:style style:name="T1" style:family="text">
      <style:text-properties style:text-position="0% 100%" fo:font-size="14pt" style:letter-kerning="false"/>
    </style:style>
    <style:style style:name="T2" style:family="text">
      <style:text-properties fo:font-size="12pt" style:font-size-asian="9pt" style:font-size-complex="9pt"/>
    </style:style>
  </office:automatic-styles>
  <office:body>
    <office:chart>
      <chart:chart svg:width="19.687cm" svg:height="11.104cm" xlink:href=".." xlink:type="simple" chart:class="chart:line" chart:style-name="ch1">
        <chart:title svg:x="4.461cm" svg:y="0.357cm" chart:style-name="ch2">
          <text:p><text:span text:style-name="T1">График эффективности распараллеливания </text:span></text:p>
        </chart:title>
        <chart:plot-area chart:style-name="ch3" svg:x="1.548cm" svg:y="1.432cm" svg:width="17.746cm" svg:height="8.325cm">
          <chart:coordinate-region svg:x="2.373cm" svg:y="1.631cm" svg:width="16.728cm" svg:height="7.479cm"/>
          <chart:axis chart:dimension="x" chart:name="primary-x" chart:style-name="ch4" chartooo:axis-type="auto">
            <chartooo:date-scale/>
            <chart:title svg:x="8.649cm" svg:y="9.979cm" chart:style-name="ch2">
              <text:p><text:span text:style-name="T2">Число процессов</text:span></text:p>
            </chart:title>
            <chart:categories table:cell-range-address="Sheet1.A2:Sheet1.A7"/>
          </chart:axis>
          <chart:axis chart:dimension="y" chart:name="primary-y" chart:style-name="ch4">
            <chart:title svg:x="0.451cm" svg:y="9.89cm" chart:style-name="ch5">
              <text:p><text:span text:style-name="T2">Эффективность использования процессов</text:span></text:p>
            </chart:title>
            <chart:grid chart:style-name="ch6" chart:class="major"/>
          </chart:axis>
          <chart:series chart:style-name="ch7" chart:values-cell-range-address="Sheet1.F2:Sheet1.F7" chart:label-cell-address="Sheet1.F1:Sheet1.F1" chart:class="chart:line">
            <chart:data-point chart:repeated="6"/>
          </chart:series>
          <chart:wall chart:style-name="ch8"/>
          <chart:floor chart:style-name="ch9"/>
        </chart:plot-area>
        <draw:frame draw:style-name="gr1" draw:text-style-name="P1" svg:width="0.999cm" svg:height="0.999cm" svg:x="0cm" svg:y="0cm">
          <draw:image xlink:href="Pictures/2000000600004CE900002B68FA3B08D2.svm" xlink:type="simple" xlink:show="embed" xlink:actuate="onLoad" draw:mime-type="image/x-svm">
            <text:p/>
          </draw:image>
          <draw:image xlink:href="Pictures/10000000000002E9000001A5BC5F5132.png" xlink:type="simple" xlink:show="embed" xlink:actuate="onLoad" draw:mime-type="image/png"/>
        </draw:frame>
        <draw:frame draw:style-name="gr1" draw:text-style-name="P2" svg:width="0.999cm" svg:height="0.999cm" svg:x="0cm" svg:y="0cm">
          <draw:image xlink:href="Pictures/2000000600004CE900002B68FA3B08D2.svm" xlink:type="simple" xlink:show="embed" xlink:actuate="onLoad" draw:mime-type="image/x-svm">
            <text:p/>
          </draw:image>
          <draw:image xlink:href="Pictures/10000000000002E9000001A5BC5F5132.png" xlink:type="simple" xlink:show="embed" xlink:actuate="onLoad" draw:mime-type="image/png"/>
        </draw:frame>
        <draw:frame draw:style-name="gr1" draw:text-style-name="P1" svg:width="1cm" svg:height="1cm" svg:x="0cm" svg:y="0cm">
          <draw:image xlink:href="Pictures/2000000600004CE800002B61D75C6A01.svm" xlink:type="simple" xlink:show="embed" xlink:actuate="onLoad" draw:mime-type="image/x-svm">
            <text:p/>
          </draw:image>
          <draw:image xlink:href="Pictures/10000000000002E9000001A5BC5F5132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100">
                <text:p>100</text:p>
                <draw:g>
                  <svg:desc>Sheet1.F2:Sheet1.F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9.450889404486">
                <text:p>119.4508894044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2.7458096182967">
                <text:p>92.74580961829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.554180232201">
                <text:p>54.5541802322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7.0098141356893">
                <text:p>37.00981413568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5.8953760963583">
                <text:p>35.89537609635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14pt"/>
    </style:style>
    <style:style style:name="T2" style:family="text">
      <style:text-properties fo:font-size="12pt" style:font-size-asian="9pt" style:font-size-complex="9pt"/>
    </style:style>
    <style:style style:name="T3" style:family="text">
      <style:text-properties style:text-position="0% 100%" fo:font-size="12pt" style:letter-kerning="false" style:font-size-asian="9pt" style:font-size-complex="9pt"/>
    </style:style>
  </office:automatic-styles>
  <office:body>
    <office:chart>
      <chart:chart svg:width="19.798cm" svg:height="11.183cm" xlink:href=".." xlink:type="simple" chart:class="chart:line" chart:style-name="ch1">
        <chart:title svg:x="6.41cm" svg:y="0.358cm" chart:style-name="ch2">
          <text:p><text:span text:style-name="T1">График времени исполнения</text:span></text:p>
        </chart:title>
        <chart:plot-area chart:style-name="ch3" svg:x="1.55cm" svg:y="1.434cm" svg:width="17.853cm" svg:height="8.401cm">
          <chart:coordinate-region svg:x="2.184cm" svg:y="1.633cm" svg:width="17.027cm" svg:height="7.555cm"/>
          <chart:axis chart:dimension="x" chart:name="primary-x" chart:style-name="ch4" chartooo:axis-type="auto">
            <chartooo:date-scale/>
            <chart:title svg:x="8.704cm" svg:y="10.058cm" chart:style-name="ch2">
              <text:p><text:span text:style-name="T2">Число процессов</text:span></text:p>
            </chart:title>
            <chart:categories table:cell-range-address="Sheet1.A10:Sheet1.A15"/>
          </chart:axis>
          <chart:axis chart:dimension="y" chart:name="primary-y" chart:style-name="ch4">
            <chart:title svg:x="0.451cm" svg:y="8.502cm" chart:style-name="ch5">
              <text:p><text:span text:style-name="T3">Время исполнения, секунды</text:span></text:p>
            </chart:title>
            <chart:grid chart:style-name="ch6" chart:class="major"/>
          </chart:axis>
          <chart:series chart:style-name="ch7" chart:values-cell-range-address="Sheet1.D10:Sheet1.D15" chart:label-cell-address="Sheet1.D9:Sheet1.D9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D9:Sheet1.D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0:Sheet1.A15</svg:desc>
                </draw:g>
              </table:table-cell>
              <table:table-cell office:value-type="float" office:value="22.116">
                <text:p>22.116</text:p>
                <draw:g>
                  <svg:desc>Sheet1.D10:Sheet1.D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209">
                <text:p>11.2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753">
                <text:p>5.7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651">
                <text:p>1.65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181">
                <text:p>1.1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  <style:style style:name="T1" style:family="text">
      <style:text-properties style:text-position="0% 100%" fo:font-size="14pt" style:letter-kerning="false"/>
    </style:style>
    <style:style style:name="T2" style:family="text">
      <style:text-properties fo:font-size="12pt" style:font-size-asian="9pt" style:font-size-complex="9pt"/>
    </style:style>
    <style:style style:name="T3" style:family="text">
      <style:text-properties style:text-position="0% 100%" fo:font-size="12pt" style:letter-kerning="false" style:font-size-asian="9pt" style:font-size-complex="9pt"/>
    </style:style>
  </office:automatic-styles>
  <office:body>
    <office:chart>
      <chart:chart svg:width="19.688cm" svg:height="11.111cm" xlink:href=".." xlink:type="simple" chart:class="chart:line" chart:style-name="ch1">
        <chart:title svg:x="6.094cm" svg:y="0.357cm" chart:style-name="ch2">
          <text:p><text:span text:style-name="T1">График ускорения исполнения </text:span></text:p>
        </chart:title>
        <chart:plot-area chart:style-name="ch3" svg:x="1.548cm" svg:y="1.432cm" svg:width="17.747cm" svg:height="8.332cm">
          <chart:coordinate-region svg:x="2.182cm" svg:y="1.631cm" svg:width="16.92cm" svg:height="7.486cm"/>
          <chart:axis chart:dimension="x" chart:name="primary-x" chart:style-name="ch4" chartooo:axis-type="auto">
            <chartooo:date-scale/>
            <chart:title svg:x="8.649cm" svg:y="9.986cm" chart:style-name="ch2">
              <text:p><text:span text:style-name="T2">Число процессов</text:span></text:p>
            </chart:title>
            <chart:categories table:cell-range-address="Sheet1.A10:Sheet1.A15"/>
          </chart:axis>
          <chart:axis chart:dimension="y" chart:name="primary-y" chart:style-name="ch4">
            <chart:title svg:x="0.451cm" svg:y="9.442cm" chart:style-name="ch5">
              <text:p><text:span text:style-name="T3">Коэффикциент ускорения исполнения</text:span></text:p>
            </chart:title>
            <chart:grid chart:style-name="ch6" chart:class="major"/>
          </chart:axis>
          <chart:series chart:style-name="ch7" chart:values-cell-range-address="Sheet1.E10:Sheet1.E15" chart:label-cell-address="Sheet1.E9:Sheet1.E9" chart:class="chart:line">
            <chart:data-point chart:repeated="6"/>
          </chart:series>
          <chart:wall chart:style-name="ch8"/>
          <chart:floor chart:style-name="ch9"/>
        </chart:plot-area>
        <draw:frame draw:style-name="gr1" draw:text-style-name="P1" svg:width="1cm" svg:height="1cm" svg:x="0cm" svg:y="0cm">
          <draw:image xlink:href="Pictures/2000000600004CE900002B68FA3B08D2.svm" xlink:type="simple" xlink:show="embed" xlink:actuate="onLoad" draw:mime-type="image/x-svm">
            <text:p/>
          </draw:image>
          <draw:image xlink:href="Pictures/10000000000002E9000001A5BC5F5132.png" xlink:type="simple" xlink:show="embed" xlink:actuate="onLoad" draw:mime-type="image/png"/>
        </draw:frame>
        <draw:frame draw:style-name="gr1" draw:text-style-name="P2" svg:width="1cm" svg:height="1cm" svg:x="0cm" svg:y="0cm">
          <draw:image xlink:href="Pictures/2000000600004CE900002B68FA3B08D2.svm" xlink:type="simple" xlink:show="embed" xlink:actuate="onLoad" draw:mime-type="image/x-svm">
            <text:p/>
          </draw:image>
          <draw:image xlink:href="Pictures/10000000000002E9000001A5BC5F5132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</text:p>
                <draw:g>
                  <svg:desc>Sheet1.E9:Sheet1.E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0:Sheet1.A15</svg:desc>
                </draw:g>
              </table:table-cell>
              <table:table-cell office:value-type="float" office:value="1">
                <text:p>1</text:p>
                <draw:g>
                  <svg:desc>Sheet1.E10:Sheet1.E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7305736461772">
                <text:p>1.973057364617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84425517121502">
                <text:p>3.844255171215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19921875">
                <text:p>7.199218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.3955178679588">
                <text:p>13.395517867958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8.7265029635902">
                <text:p>18.72650296359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  <style:style style:name="T1" style:family="text">
      <style:text-properties style:text-position="0% 100%" fo:font-size="14pt" style:letter-kerning="false"/>
    </style:style>
    <style:style style:name="T2" style:family="text">
      <style:text-properties fo:font-size="12pt" style:font-size-asian="9pt" style:font-size-complex="9pt"/>
    </style:style>
  </office:automatic-styles>
  <office:body>
    <office:chart>
      <chart:chart svg:width="19.688cm" svg:height="11.104cm" xlink:href=".." xlink:type="simple" chart:class="chart:line" chart:style-name="ch1">
        <chart:title svg:x="4.462cm" svg:y="0.357cm" chart:style-name="ch2">
          <text:p><text:span text:style-name="T1">График эффективности распараллеливания </text:span></text:p>
        </chart:title>
        <chart:plot-area chart:style-name="ch3" svg:x="1.548cm" svg:y="1.432cm" svg:width="17.747cm" svg:height="8.325cm">
          <chart:coordinate-region svg:x="2.373cm" svg:y="1.631cm" svg:width="16.729cm" svg:height="7.479cm"/>
          <chart:axis chart:dimension="x" chart:name="primary-x" chart:style-name="ch4" chartooo:axis-type="auto">
            <chartooo:date-scale/>
            <chart:title svg:x="8.649cm" svg:y="9.979cm" chart:style-name="ch2">
              <text:p><text:span text:style-name="T2">Число процессов</text:span></text:p>
            </chart:title>
            <chart:categories table:cell-range-address="Sheet1.A10:Sheet1.A15"/>
          </chart:axis>
          <chart:axis chart:dimension="y" chart:name="primary-y" chart:style-name="ch4">
            <chart:title svg:x="0.451cm" svg:y="9.89cm" chart:style-name="ch5">
              <text:p><text:span text:style-name="T2">Эффективность использования процессов</text:span></text:p>
            </chart:title>
            <chart:grid chart:style-name="ch6" chart:class="major"/>
          </chart:axis>
          <chart:series chart:style-name="ch7" chart:values-cell-range-address="Sheet1.F10:Sheet1.F15" chart:label-cell-address="Sheet1.F9:Sheet1.F9" chart:class="chart:line">
            <chart:data-point chart:repeated="6"/>
          </chart:series>
          <chart:wall chart:style-name="ch8"/>
          <chart:floor chart:style-name="ch9"/>
        </chart:plot-area>
        <draw:frame draw:style-name="gr1" draw:text-style-name="P1" svg:width="0.999cm" svg:height="0.999cm" svg:x="0cm" svg:y="0cm">
          <draw:image xlink:href="Pictures/2000000600004CE900002B68FA3B08D2.svm" xlink:type="simple" xlink:show="embed" xlink:actuate="onLoad" draw:mime-type="image/x-svm">
            <text:p/>
          </draw:image>
          <draw:image xlink:href="Pictures/10000000000002E9000001A5BC5F5132.png" xlink:type="simple" xlink:show="embed" xlink:actuate="onLoad" draw:mime-type="image/png"/>
        </draw:frame>
        <draw:frame draw:style-name="gr1" draw:text-style-name="P2" svg:width="0.999cm" svg:height="0.999cm" svg:x="0cm" svg:y="0cm">
          <draw:image xlink:href="Pictures/2000000600004CE900002B68FA3B08D2.svm" xlink:type="simple" xlink:show="embed" xlink:actuate="onLoad" draw:mime-type="image/x-svm">
            <text:p/>
          </draw:image>
          <draw:image xlink:href="Pictures/10000000000002E9000001A5BC5F5132.png" xlink:type="simple" xlink:show="embed" xlink:actuate="onLoad" draw:mime-type="image/png"/>
        </draw:frame>
        <draw:frame draw:style-name="gr1" draw:text-style-name="P1" svg:width="1cm" svg:height="1cm" svg:x="0cm" svg:y="0cm">
          <draw:image xlink:href="Pictures/2000000600004CE800002B61D75C6A01.svm" xlink:type="simple" xlink:show="embed" xlink:actuate="onLoad" draw:mime-type="image/x-svm">
            <text:p/>
          </draw:image>
          <draw:image xlink:href="Pictures/10000000000002E9000001A5BC5F5132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</text:p>
                <draw:g>
                  <svg:desc>Sheet1.F9:Sheet1.F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0:Sheet1.A15</svg:desc>
                </draw:g>
              </table:table-cell>
              <table:table-cell office:value-type="float" office:value="100">
                <text:p>100</text:p>
                <draw:g>
                  <svg:desc>Sheet1.F10:Sheet1.F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8.6528682308859">
                <text:p>98.65286823088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6.1063792803755">
                <text:p>96.10637928037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9.990234375">
                <text:p>89.9902343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3.7219866747426">
                <text:p>83.721986674742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8.0270956816258">
                <text:p>78.02709568162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