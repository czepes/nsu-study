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shapes>
          <draw:frame draw:z-index="0" draw:style-name="gr1" draw:text-style-name="P1" svg:width="8.0551in" svg:height="4.5307in" svg:x="5.0154in" svg:y="0.1543in">
            <draw:object draw:notify-on-update-of-ranges="Sheet1.A1:Sheet1.A1 Sheet1.A2:Sheet1.A7 Sheet1.B1:Sheet1.B1 Sheet1.B2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in" svg:height="4.5071in" svg:x="0.2709in" svg:y="4.8209in">
            <draw:object draw:notify-on-update-of-ranges="Sheet1.A8:Sheet1.A8 Sheet1.A9:Sheet1.A15 Sheet1.B8:Sheet1.B8 Sheet1.B9:Sheet1.B15 Sheet1.C8:Sheet1.C8 Sheet1.C9:Sheet1.C15 Sheet1.D8:Sheet1.D8 Sheet1.D9:Sheet1.D15 Sheet1.E8:Sheet1.E8 Sheet1.E9:Sheet1.E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.8917in" svg:height="4.4551in" svg:x="8.3902in" svg:y="4.8732in">
            <draw:object draw:notify-on-update-of-ranges="Sheet1.A2:Sheet1.A7 Sheet1.C1:Sheet1.C1 Sheet1.C2:Sheet1.C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0539in" svg:height="4.5488in" svg:x="13.3335in" svg:y="0.1256in">
            <draw:object draw:notify-on-update-of-ranges="Sheet1.A2:Sheet1.A7 Sheet1.D1:Sheet1.D1 Sheet1.D2:Sheet1.D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hreads_nu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efficienc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.7655" calcext:value-type="float">
            <text:p>45.7655</text:p>
          </table:table-cell>
          <table:table-cell table:formula="of:= [.$B2] / [.$B2]" office:value-type="float" office:value="1" calcext:value-type="float">
            <text:p>1</text:p>
          </table:table-cell>
          <table:table-cell table:formula="of:= 100 * [.$C2] / [.$A2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.3633" calcext:value-type="float">
            <text:p>29.3633</text:p>
          </table:table-cell>
          <table:table-cell table:formula="of:= [.$B2] / [.$B3]" office:value-type="float" office:value="1.55859525325832" calcext:value-type="float">
            <text:p>1.55859525325832</text:p>
          </table:table-cell>
          <table:table-cell table:formula="of:= 100 * [.$C3] / [.$A3]" office:value-type="float" office:value="77.929762662916" calcext:value-type="float">
            <text:p>77.9297626629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8785" calcext:value-type="float">
            <text:p>21.8785</text:p>
          </table:table-cell>
          <table:table-cell table:formula="of:= [.$B2] / [.$B4]" office:value-type="float" office:value="2.09180245446443" calcext:value-type="float">
            <text:p>2.09180245446443</text:p>
          </table:table-cell>
          <table:table-cell table:formula="of:= 100 * [.$C4] / [.$A4]" office:value-type="float" office:value="52.2950613616107" calcext:value-type="float">
            <text:p>52.295061361610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.7466" calcext:value-type="float">
            <text:p>19.7466</text:p>
          </table:table-cell>
          <table:table-cell table:formula="of:= [.$B2] / [.$B5]" office:value-type="float" office:value="2.31763949236831" calcext:value-type="float">
            <text:p>2.31763949236831</text:p>
          </table:table-cell>
          <table:table-cell table:formula="of:= 100 * [.$C5] / [.$A5]" office:value-type="float" office:value="28.9704936546038" calcext:value-type="float">
            <text:p>28.970493654603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.1494" calcext:value-type="float">
            <text:p>20.1494</text:p>
          </table:table-cell>
          <table:table-cell table:formula="of:= [.$B2] / [.$B6]" office:value-type="float" office:value="2.27130832679881" calcext:value-type="float">
            <text:p>2.27130832679881</text:p>
          </table:table-cell>
          <table:table-cell table:formula="of:= 100 * [.$C6] / [.$A6]" office:value-type="float" office:value="18.9275693899901" calcext:value-type="float">
            <text:p>18.927569389990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.3817" calcext:value-type="float">
            <text:p>20.3817</text:p>
          </table:table-cell>
          <table:table-cell table:formula="of:= [.$B2] / [.$B7]" office:value-type="float" office:value="2.24542113758911" calcext:value-type="float">
            <text:p>2.24542113758911</text:p>
          </table:table-cell>
          <table:table-cell table:formula="of:= 100 * [.$C7] / [.$A7]" office:value-type="float" office:value="14.033882109932" calcext:value-type="float">
            <text:p>14.033882109932</text:p>
          </table:table-cell>
          <table:table-cell/>
        </table:table-row>
        <table:table-row table:style-name="ro1">
          <table:table-cell office:value-type="string" calcext:value-type="string">
            <text:p>chunk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5596" calcext:value-type="float">
            <text:p>17.5596</text:p>
          </table:table-cell>
          <table:table-cell office:value-type="float" office:value="20.2068" calcext:value-type="float">
            <text:p>20.2068</text:p>
          </table:table-cell>
          <table:table-cell office:value-type="float" office:value="13.4571" calcext:value-type="float">
            <text:p>13.4571</text:p>
          </table:table-cell>
          <table:table-cell office:value-type="float" office:value="11.4449" calcext:value-type="float">
            <text:p>11.44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2423" calcext:value-type="float">
            <text:p>15.2423</text:p>
          </table:table-cell>
          <table:table-cell office:value-type="float" office:value="13.4936" calcext:value-type="float">
            <text:p>13.4936</text:p>
          </table:table-cell>
          <table:table-cell office:value-type="float" office:value="13.1597" calcext:value-type="float">
            <text:p>13.1597</text:p>
          </table:table-cell>
          <table:table-cell office:value-type="float" office:value="11.4449" calcext:value-type="float">
            <text:p>11.44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2868" calcext:value-type="float">
            <text:p>14.2868</text:p>
          </table:table-cell>
          <table:table-cell office:value-type="float" office:value="13.4312" calcext:value-type="float">
            <text:p>13.4312</text:p>
          </table:table-cell>
          <table:table-cell office:value-type="float" office:value="13.7426" calcext:value-type="float">
            <text:p>13.7426</text:p>
          </table:table-cell>
          <table:table-cell office:value-type="float" office:value="11.4449" calcext:value-type="float">
            <text:p>11.44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.1623" calcext:value-type="float">
            <text:p>12.1623</text:p>
          </table:table-cell>
          <table:table-cell office:value-type="float" office:value="13.5327" calcext:value-type="float">
            <text:p>13.5327</text:p>
          </table:table-cell>
          <table:table-cell office:value-type="float" office:value="13.764" calcext:value-type="float">
            <text:p>13.764</text:p>
          </table:table-cell>
          <table:table-cell office:value-type="float" office:value="11.4449" calcext:value-type="float">
            <text:p>11.44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.9338" calcext:value-type="float">
            <text:p>12.9338</text:p>
          </table:table-cell>
          <table:table-cell office:value-type="float" office:value="13.9068" calcext:value-type="float">
            <text:p>13.9068</text:p>
          </table:table-cell>
          <table:table-cell office:value-type="float" office:value="13.7284" calcext:value-type="float">
            <text:p>13.7284</text:p>
          </table:table-cell>
          <table:table-cell office:value-type="float" office:value="11.4449" calcext:value-type="float">
            <text:p>11.44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.9755" calcext:value-type="float">
            <text:p>12.9755</text:p>
          </table:table-cell>
          <table:table-cell office:value-type="float" office:value="13.5171" calcext:value-type="float">
            <text:p>13.5171</text:p>
          </table:table-cell>
          <table:table-cell office:value-type="float" office:value="13.7457" calcext:value-type="float">
            <text:p>13.7457</text:p>
          </table:table-cell>
          <table:table-cell office:value-type="float" office:value="11.4449" calcext:value-type="float">
            <text:p>11.44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.1507" calcext:value-type="float">
            <text:p>12.1507</text:p>
          </table:table-cell>
          <table:table-cell office:value-type="float" office:value="13.6013" calcext:value-type="float">
            <text:p>13.6013</text:p>
          </table:table-cell>
          <table:table-cell office:value-type="float" office:value="13.9061" calcext:value-type="float">
            <text:p>13.9061</text:p>
          </table:table-cell>
          <table:table-cell office:value-type="float" office:value="11.4449" calcext:value-type="float">
            <text:p>11.44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8">00/00/0000</text:date>, <text:time style:data-style-name="N2" text:time-value="12:42:52.4902068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3T22:15:02.689799637</meta:creation-date>
    <dc:date>2026-03-28T13:12:07.937229729</dc:date>
    <meta:editing-duration>PT53M52S</meta:editing-duration>
    <meta:editing-cycles>4</meta:editing-cycles>
    <meta:generator>LibreOffice/26.2.1.2$Linux_X86_64 LibreOffice_project/620$Build-2</meta:generator>
    <meta:document-statistic meta:table-count="1" meta:cell-count="68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11pt" style:font-size-asian="9pt" style:font-size-complex="9pt"/>
    </style:style>
    <style:style style:name="T2" style:family="text">
      <style:text-properties style:text-position="0% 100%" fo:font-size="11pt" style:letter-kerning="false" style:font-size-asian="9pt" style:font-size-complex="9pt"/>
    </style:style>
  </office:automatic-styles>
  <office:body>
    <office:chart>
      <chart:chart svg:width="20.461cm" svg:height="11.509cm" xlink:href=".." xlink:type="simple" chart:class="chart:line" chart:style-name="ch1">
        <chart:title svg:x="2.628cm" svg:y="0.366cm" chart:style-name="ch2">
          <text:p>График зависимости времени исполнения программы от числа потоков</text:p>
        </chart:title>
        <chart:plot-area chart:style-name="ch3" svg:x="1.542cm" svg:y="1.375cm" svg:width="18.51cm" svg:height="8.801cm">
          <chart:coordinate-region svg:x="2.176cm" svg:y="1.574cm" svg:width="17.683cm" svg:height="7.955cm"/>
          <chart:axis chart:dimension="x" chart:name="primary-x" chart:style-name="ch4" chartooo:axis-type="auto">
            <chartooo:date-scale/>
            <chart:title svg:x="9.381cm" svg:y="10.406cm" chart:style-name="ch2">
              <text:p><text:span text:style-name="T1">Число потоков</text:span></text:p>
            </chart:title>
            <chart:categories table:cell-range-address="Sheet1.A2:Sheet1.A7"/>
          </chart:axis>
          <chart:axis chart:dimension="y" chart:name="primary-y" chart:style-name="ch4">
            <chart:title svg:x="0.451cm" svg:y="8.463cm" chart:style-name="ch5">
              <text:p><text:span text:style-name="T2">Время исполнения, секунды</text:span></text:p>
            </chart:title>
            <chart:grid chart:style-name="ch6" chart:class="major"/>
          </chart:axis>
          <chart:series chart:style-name="ch7" chart:values-cell-range-address="Sheet1.B2:Sheet1.B7" chart:label-cell-address="Sheet1.B1:Sheet1.B1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7</svg:desc>
                </draw:g>
              </table:table-cell>
              <table:table-cell office:value-type="float" office:value="45.7655">
                <text:p>45.7655</text:p>
                <draw:g>
                  <svg:desc>Sheet1.B2:Sheet1.B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9.3633">
                <text:p>29.36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.8785">
                <text:p>21.87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9.7466">
                <text:p>19.746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0.1494">
                <text:p>20.149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0.3817">
                <text:p>20.38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11pt" style:font-size-asian="9pt" style:font-size-complex="9pt"/>
    </style:style>
  </office:automatic-styles>
  <office:body>
    <office:chart>
      <chart:chart svg:width="20.321cm" svg:height="11.449cm" xlink:href=".." xlink:type="simple" chart:class="chart:line" chart:style-name="ch1">
        <chart:title svg:x="2.92cm" svg:y="0.363cm" chart:style-name="ch2">
          <text:p>График зависимости времени исполнения программы от параметра schedule </text:p>
        </chart:title>
        <chart:legend chart:legend-position="end" svg:x="17.476cm" svg:y="1.996cm" style:legend-expansion="custom" svg:width="2.428cm" svg:height="1.601cm" style:legend-expansion-aspect-ratio="1.51655215490319" chart:style-name="ch3"/>
        <chart:plot-area chart:style-name="ch4" svg:x="1.547cm" svg:y="1.88cm" svg:width="18.671cm" svg:height="8.226cm">
          <chart:coordinate-region svg:x="2.181cm" svg:y="2.079cm" svg:width="17.749cm" svg:height="7.38cm"/>
          <chart:axis chart:dimension="x" chart:name="primary-x" chart:style-name="ch5" chartooo:axis-type="auto">
            <chartooo:date-scale/>
            <chart:title svg:x="9.545cm" svg:y="10.334cm" chart:style-name="ch2">
              <text:p><text:span text:style-name="T1">Размер чанка</text:span></text:p>
            </chart:title>
            <chart:categories table:cell-range-address="Sheet1.A9:Sheet1.A15"/>
          </chart:axis>
          <chart:axis chart:dimension="y" chart:name="primary-y" chart:style-name="ch5">
            <chart:title svg:x="0.459cm" svg:y="8.681cm" chart:style-name="ch6">
              <text:p><text:span text:style-name="T1">Время исполнения, секунды</text:span></text:p>
            </chart:title>
            <chart:grid chart:style-name="ch7" chart:class="major"/>
          </chart:axis>
          <chart:series chart:style-name="ch8" chart:values-cell-range-address="Sheet1.B9:Sheet1.B15" chart:label-cell-address="Sheet1.B8:Sheet1.B8" chart:class="chart:line">
            <chart:data-point chart:repeated="7"/>
          </chart:series>
          <chart:series chart:style-name="ch9" chart:values-cell-range-address="Sheet1.C9:Sheet1.C15" chart:label-cell-address="Sheet1.C8:Sheet1.C8" chart:class="chart:line">
            <chart:data-point chart:repeated="7"/>
          </chart:series>
          <chart:series chart:style-name="ch10" chart:values-cell-range-address="Sheet1.D9:Sheet1.D15" chart:label-cell-address="Sheet1.D8:Sheet1.D8" chart:class="chart:line">
            <chart:data-point chart:repeated="7"/>
          </chart:series>
          <chart:series chart:style-name="ch11" chart:values-cell-range-address="Sheet1.E9:Sheet1.E15" chart:label-cell-address="Sheet1.E8:Sheet1.E8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Sheet1.B8:Sheet1.B8</svg:desc>
                </draw:g>
              </table:table-cell>
              <table:table-cell office:value-type="string">
                <text:p>dynamic</text:p>
                <draw:g>
                  <svg:desc>Sheet1.C8:Sheet1.C8</svg:desc>
                </draw:g>
              </table:table-cell>
              <table:table-cell office:value-type="string">
                <text:p>guided</text:p>
                <draw:g>
                  <svg:desc>Sheet1.D8:Sheet1.D8</svg:desc>
                </draw:g>
              </table:table-cell>
              <table:table-cell office:value-type="string">
                <text:p>auto</text:p>
                <draw:g>
                  <svg:desc>Sheet1.E8:Sheet1.E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9:Sheet1.A15</svg:desc>
                </draw:g>
              </table:table-cell>
              <table:table-cell office:value-type="float" office:value="17.5596">
                <text:p>17.5596</text:p>
                <draw:g>
                  <svg:desc>Sheet1.B9:Sheet1.B15</svg:desc>
                </draw:g>
              </table:table-cell>
              <table:table-cell office:value-type="float" office:value="20.2068">
                <text:p>20.2068</text:p>
                <draw:g>
                  <svg:desc>Sheet1.C9:Sheet1.C15</svg:desc>
                </draw:g>
              </table:table-cell>
              <table:table-cell office:value-type="float" office:value="13.4571">
                <text:p>13.4571</text:p>
                <draw:g>
                  <svg:desc>Sheet1.D9:Sheet1.D15</svg:desc>
                </draw:g>
              </table:table-cell>
              <table:table-cell office:value-type="float" office:value="11.4449">
                <text:p>11.4449</text:p>
                <draw:g>
                  <svg:desc>Sheet1.E9:Sheet1.E1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2423">
                <text:p>15.2423</text:p>
              </table:table-cell>
              <table:table-cell office:value-type="float" office:value="13.4936">
                <text:p>13.4936</text:p>
              </table:table-cell>
              <table:table-cell office:value-type="float" office:value="13.1597">
                <text:p>13.1597</text:p>
              </table:table-cell>
              <table:table-cell office:value-type="float" office:value="11.4449">
                <text:p>11.44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.2868">
                <text:p>14.2868</text:p>
              </table:table-cell>
              <table:table-cell office:value-type="float" office:value="13.4312">
                <text:p>13.4312</text:p>
              </table:table-cell>
              <table:table-cell office:value-type="float" office:value="13.7426">
                <text:p>13.7426</text:p>
              </table:table-cell>
              <table:table-cell office:value-type="float" office:value="11.4449">
                <text:p>11.444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.1623">
                <text:p>12.1623</text:p>
              </table:table-cell>
              <table:table-cell office:value-type="float" office:value="13.5327">
                <text:p>13.5327</text:p>
              </table:table-cell>
              <table:table-cell office:value-type="float" office:value="13.764">
                <text:p>13.764</text:p>
              </table:table-cell>
              <table:table-cell office:value-type="float" office:value="11.4449">
                <text:p>11.444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.9338">
                <text:p>12.9338</text:p>
              </table:table-cell>
              <table:table-cell office:value-type="float" office:value="13.9068">
                <text:p>13.9068</text:p>
              </table:table-cell>
              <table:table-cell office:value-type="float" office:value="13.7284">
                <text:p>13.7284</text:p>
              </table:table-cell>
              <table:table-cell office:value-type="float" office:value="11.4449">
                <text:p>11.444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.9755">
                <text:p>12.9755</text:p>
              </table:table-cell>
              <table:table-cell office:value-type="float" office:value="13.5171">
                <text:p>13.5171</text:p>
              </table:table-cell>
              <table:table-cell office:value-type="float" office:value="13.7457">
                <text:p>13.7457</text:p>
              </table:table-cell>
              <table:table-cell office:value-type="float" office:value="11.4449">
                <text:p>11.444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.1507">
                <text:p>12.1507</text:p>
              </table:table-cell>
              <table:table-cell office:value-type="float" office:value="13.6013">
                <text:p>13.6013</text:p>
              </table:table-cell>
              <table:table-cell office:value-type="float" office:value="13.9061">
                <text:p>13.9061</text:p>
              </table:table-cell>
              <table:table-cell office:value-type="float" office:value="11.4449">
                <text:p>11.44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12pt" style:font-size-asian="9pt" style:font-size-complex="9pt"/>
    </style:style>
  </office:automatic-styles>
  <office:body>
    <office:chart>
      <chart:chart svg:width="20.046cm" svg:height="11.317cm" xlink:href=".." xlink:type="simple" chart:class="chart:line" chart:style-name="ch1">
        <chart:title svg:x="3.487cm" svg:y="0.362cm" chart:style-name="ch2">
          <text:p>График зависимости ускорения исполнения от числа потоков</text:p>
        </chart:title>
        <chart:plot-area chart:style-name="ch3" svg:x="1.555cm" svg:y="1.367cm" svg:width="18.091cm" svg:height="8.599cm">
          <chart:coordinate-region svg:x="2.284cm" svg:y="1.566cm" svg:width="17.169cm" svg:height="7.753cm"/>
          <chart:axis chart:dimension="x" chart:name="primary-x" chart:style-name="ch4" chartooo:axis-type="auto">
            <chartooo:date-scale/>
            <chart:title svg:x="9.089cm" svg:y="10.192cm" chart:style-name="ch2">
              <text:p><text:span text:style-name="T1">Число потоков</text:span></text:p>
            </chart:title>
            <chart:categories table:cell-range-address="Sheet1.A2:Sheet1.A7"/>
          </chart:axis>
          <chart:axis chart:dimension="y" chart:name="primary-y" chart:style-name="ch4">
            <chart:title svg:x="0.451cm" svg:y="8.195cm" chart:style-name="ch5">
              <text:p><text:span text:style-name="T1">Коэффициент ускорения</text:span></text:p>
            </chart:title>
            <chart:grid chart:style-name="ch6" chart:class="major"/>
          </chart:axis>
          <chart:series chart:style-name="ch7" chart:values-cell-range-address="Sheet1.C2:Sheet1.C7" chart:label-cell-address="Sheet1.C1:Sheet1.C1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tio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7</svg:desc>
                </draw:g>
              </table:table-cell>
              <table:table-cell office:value-type="float" office:value="1">
                <text:p>1</text:p>
                <draw:g>
                  <svg:desc>Sheet1.C2:Sheet1.C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55859525325832">
                <text:p>1.5585952532583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09180245446443">
                <text:p>2.0918024544644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31763949236831">
                <text:p>2.3176394923683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27130832679881">
                <text:p>2.2713083267988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24542113758911">
                <text:p>2.245421137589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12pt" style:font-size-asian="9pt" style:font-size-complex="9pt"/>
    </style:style>
  </office:automatic-styles>
  <office:body>
    <office:chart>
      <chart:chart svg:width="20.458cm" svg:height="11.555cm" xlink:href=".." xlink:type="simple" chart:class="chart:line" chart:style-name="ch1">
        <chart:title svg:x="2.233cm" svg:y="0.367cm" chart:style-name="ch2">
          <text:p>График зависимости эффективности распараллеливания от числа потоков</text:p>
        </chart:title>
        <chart:plot-area chart:style-name="ch3" svg:x="1.564cm" svg:y="1.377cm" svg:width="18.485cm" svg:height="8.822cm">
          <chart:coordinate-region svg:x="2.388cm" svg:y="1.576cm" svg:width="17.467cm" svg:height="7.976cm"/>
          <chart:axis chart:dimension="x" chart:name="primary-x" chart:style-name="ch4" chartooo:axis-type="auto">
            <chartooo:date-scale/>
            <chart:title svg:x="9.295cm" svg:y="10.43cm" chart:style-name="ch2">
              <text:p><text:span text:style-name="T1">Число потоков</text:span></text:p>
            </chart:title>
            <chart:categories table:cell-range-address="Sheet1.A2:Sheet1.A7"/>
          </chart:axis>
          <chart:axis chart:dimension="y" chart:name="primary-y" chart:style-name="ch4">
            <chart:title svg:x="0.451cm" svg:y="9.81cm" chart:style-name="ch5">
              <text:p><text:span text:style-name="T1">Эффективность распараллеливания, %</text:span></text:p>
            </chart:title>
            <chart:grid chart:style-name="ch6" chart:class="major"/>
          </chart:axis>
          <chart:series chart:style-name="ch7" chart:values-cell-range-address="Sheet1.D2:Sheet1.D7" chart:label-cell-address="Sheet1.D1:Sheet1.D1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7</svg:desc>
                </draw:g>
              </table:table-cell>
              <table:table-cell office:value-type="float" office:value="100">
                <text:p>100</text:p>
                <draw:g>
                  <svg:desc>Sheet1.D2:Sheet1.D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7.929762662916">
                <text:p>77.92976266291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2.2950613616107">
                <text:p>52.295061361610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8.9704936546038">
                <text:p>28.970493654603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8.9275693899901">
                <text:p>18.92756938999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4.033882109932">
                <text:p>14.0338821099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