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861in"/>
    </style:style>
    <style:style style:name="co4" style:family="table-column">
      <style:table-column-properties fo:break-before="auto" style:column-width="0.71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time" table:style-name="ta1">
        <table:shapes>
          <draw:frame draw:z-index="0" draw:style-name="gr1" draw:text-style-name="P1" svg:width="7.9917in" svg:height="4.5071in" svg:x="4.3445in" svg:y="0.0626in">
            <draw:object draw:notify-on-update-of-ranges="time.A2:time.A6 time.B1:time.B1 time.B2:time.B6 time.C1:time.C1 time.C2:time.C6 time.D1:time.D1 time.D2:time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9272in" svg:height="4.4587in" svg:x="4.3689in" svg:y="4.6823in">
            <draw:object draw:notify-on-update-of-ranges="time.A8:time.A12 time.B7:time.B7 time.B8:time.B12 time.C7:time.C7 time.C8:time.C12 time.D7:time.D7 time.D8:time.D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8622in" svg:height="4.4224in" svg:x="4.4012in" svg:y="9.2417in">
            <draw:object draw:notify-on-update-of-ranges="time.A14:time.A18 time.B13:time.B13 time.B14:time.B18 time.C13:time.C13 time.C14:time.C18 time.D13:time.D13 time.D14:time.D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pus</text:p>
          </table:table-cell>
          <table:table-cell office:value-type="string" calcext:value-type="string">
            <text:p>Последовательная</text:p>
          </table:table-cell>
          <table:table-cell office:value-type="string" calcext:value-type="string">
            <text:p>Точка-точка</text:p>
          </table:table-cell>
          <table:table-cell office:value-type="string" calcext:value-type="string">
            <text:p>Коллективная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.71672" calcext:value-type="float">
            <text:p>46.71672</text:p>
          </table:table-cell>
          <table:table-cell office:value-type="float" office:value="23.579874" calcext:value-type="float">
            <text:p>23.579874</text:p>
          </table:table-cell>
          <table:table-cell office:value-type="float" office:value="23.777554" calcext:value-type="float">
            <text:p>23.7775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.71672" calcext:value-type="float">
            <text:p>46.71672</text:p>
          </table:table-cell>
          <table:table-cell office:value-type="float" office:value="11.917045" calcext:value-type="float">
            <text:p>11.917045</text:p>
          </table:table-cell>
          <table:table-cell office:value-type="float" office:value="11.90936" calcext:value-type="float">
            <text:p>11.909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.71672" calcext:value-type="float">
            <text:p>46.71672</text:p>
          </table:table-cell>
          <table:table-cell office:value-type="float" office:value="6.247741" calcext:value-type="float">
            <text:p>6.247741</text:p>
          </table:table-cell>
          <table:table-cell office:value-type="float" office:value="6.234545" calcext:value-type="float">
            <text:p>6.2345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.71672" calcext:value-type="float">
            <text:p>46.71672</text:p>
          </table:table-cell>
          <table:table-cell office:value-type="float" office:value="5.044346" calcext:value-type="float">
            <text:p>5.044346</text:p>
          </table:table-cell>
          <table:table-cell office:value-type="float" office:value="5.00678" calcext:value-type="float">
            <text:p>5.006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.71672" calcext:value-type="float">
            <text:p>46.71672</text:p>
          </table:table-cell>
          <table:table-cell office:value-type="float" office:value="3.631974" calcext:value-type="float">
            <text:p>3.631974</text:p>
          </table:table-cell>
          <table:table-cell office:value-type="float" office:value="3.634103" calcext:value-type="float">
            <text:p>3.634103</text:p>
          </table:table-cell>
        </table:table-row>
        <table:table-row table:style-name="ro1">
          <table:table-cell office:value-type="string" calcext:value-type="string">
            <text:p>cpus</text:p>
          </table:table-cell>
          <table:table-cell office:value-type="string" calcext:value-type="string">
            <text:p>Последовательная</text:p>
          </table:table-cell>
          <table:table-cell office:value-type="string" calcext:value-type="string">
            <text:p>Точка-точка</text:p>
          </table:table-cell>
          <table:table-cell office:value-type="string" calcext:value-type="string">
            <text:p>Коллективная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981211" calcext:value-type="float">
            <text:p>1.981211</text:p>
          </table:table-cell>
          <table:table-cell office:value-type="float" office:value="1.96474" calcext:value-type="float">
            <text:p>1.964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920159" calcext:value-type="float">
            <text:p>3.920159</text:p>
          </table:table-cell>
          <table:table-cell office:value-type="float" office:value="3.922689" calcext:value-type="float">
            <text:p>3.9226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477377" calcext:value-type="float">
            <text:p>7.477377</text:p>
          </table:table-cell>
          <table:table-cell office:value-type="float" office:value="7.493204" calcext:value-type="float">
            <text:p>7.4932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.261204" calcext:value-type="float">
            <text:p>9.261204</text:p>
          </table:table-cell>
          <table:table-cell office:value-type="float" office:value="9.330691" calcext:value-type="float">
            <text:p>9.3306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2.862625" calcext:value-type="float">
            <text:p>12.862625</text:p>
          </table:table-cell>
          <table:table-cell office:value-type="float" office:value="12.855089" calcext:value-type="float">
            <text:p>12.855089</text:p>
          </table:table-cell>
        </table:table-row>
        <table:table-row table:style-name="ro1">
          <table:table-cell office:value-type="string" calcext:value-type="string">
            <text:p>cpus</text:p>
          </table:table-cell>
          <table:table-cell office:value-type="string" calcext:value-type="string">
            <text:p>Последовательная</text:p>
          </table:table-cell>
          <table:table-cell office:value-type="string" calcext:value-type="string">
            <text:p>Точка-точка</text:p>
          </table:table-cell>
          <table:table-cell office:value-type="string" calcext:value-type="string">
            <text:p>Коллективная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9.0605" calcext:value-type="float">
            <text:p>99.0605</text:p>
          </table:table-cell>
          <table:table-cell office:value-type="float" office:value="98.237" calcext:value-type="float">
            <text:p>98.2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98.0039" calcext:value-type="float">
            <text:p>98.0039</text:p>
          </table:table-cell>
          <table:table-cell office:value-type="float" office:value="98.0672" calcext:value-type="float">
            <text:p>98.06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93.4672" calcext:value-type="float">
            <text:p>93.4672</text:p>
          </table:table-cell>
          <table:table-cell office:value-type="float" office:value="93.665" calcext:value-type="float">
            <text:p>93.6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5" calcext:value-type="float">
            <text:p>12.5</text:p>
          </table:table-cell>
          <table:table-cell office:value-type="float" office:value="57.8825" calcext:value-type="float">
            <text:p>57.8825</text:p>
          </table:table-cell>
          <table:table-cell office:value-type="float" office:value="58.3168" calcext:value-type="float">
            <text:p>58.31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166666" calcext:value-type="float">
            <text:p>4.166666</text:p>
          </table:table-cell>
          <table:table-cell office:value-type="float" office:value="53.5942" calcext:value-type="float">
            <text:p>53.5942</text:p>
          </table:table-cell>
          <table:table-cell office:value-type="float" office:value="53.5628" calcext:value-type="float">
            <text:p>53.5628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1">00/00/0000</text:date>, <text:time style:data-style-name="N2" text:time-value="14:15:50.1948457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21T14:16:30.352999653</dc:date>
    <meta:editing-duration>PT37M20S</meta:editing-duration>
    <meta:editing-cycles>4</meta:editing-cycles>
    <meta:generator>LibreOffice/26.2.0.3$Linux_X86_64 LibreOffice_project/620$Build-3</meta:generator>
    <meta:document-statistic meta:table-count="1" meta:cell-count="73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_20__28_Rounded_29_" svg:stroke-width="0.08cm" svg:stroke-color="#ffd320" svg:stroke-linecap="round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2pt" style:letter-kerning="false" style:font-size-asian="9pt" style:font-size-complex="9pt"/>
    </style:style>
    <style:style style:name="T2" style:family="text">
      <style:text-properties fo:font-size="12pt" style:font-size-asian="9pt" style:font-size-complex="9pt"/>
    </style:style>
  </office:automatic-styles>
  <office:body>
    <office:chart>
      <chart:chart svg:width="20.3cm" svg:height="11.449cm" xlink:href=".." xlink:type="simple" chart:class="chart:line" chart:style-name="ch1">
        <chart:title svg:x="6.982cm" svg:y="0.364cm" chart:style-name="ch2">
          <text:p>График времени выполнения</text:p>
        </chart:title>
        <chart:legend chart:legend-position="top" svg:x="3.645cm" svg:y="1.328cm" style:legend-expansion="wide" chart:style-name="ch3"/>
        <chart:plot-area chart:style-name="ch4" svg:x="1.561cm" svg:y="2.154cm" svg:width="18.333cm" svg:height="7.942cm">
          <chart:coordinate-region svg:x="2.195cm" svg:y="2.354cm" svg:width="17.506cm" svg:height="7.095cm"/>
          <chart:axis chart:dimension="x" chart:name="primary-x" chart:style-name="ch5" chartooo:axis-type="auto">
            <chartooo:date-scale/>
            <chart:title svg:x="8.955cm" svg:y="10.324cm" chart:style-name="ch2">
              <text:p><text:span text:style-name="T1">Число процессов</text:span></text:p>
            </chart:title>
            <chart:categories table:cell-range-address="time.A2:time.A6"/>
          </chart:axis>
          <chart:axis chart:dimension="y" chart:name="primary-y" chart:style-name="ch5">
            <chart:title svg:x="0.451cm" svg:y="9.034cm" chart:style-name="ch6">
              <text:p><text:span text:style-name="T2">Время выполнения, секунды</text:span></text:p>
            </chart:title>
            <chart:grid chart:style-name="ch7" chart:class="major"/>
          </chart:axis>
          <chart:series chart:style-name="ch8" chart:values-cell-range-address="time.B2:time.B6" chart:label-cell-address="time.B1:time.B1" chart:class="chart:line">
            <chart:data-point chart:repeated="5"/>
          </chart:series>
          <chart:series chart:style-name="ch9" chart:values-cell-range-address="time.C2:time.C6" chart:label-cell-address="time.C1:time.C1" chart:class="chart:line">
            <chart:data-point chart:repeated="5"/>
          </chart:series>
          <chart:series chart:style-name="ch10" chart:values-cell-range-address="time.D2:time.D6" chart:label-cell-address="time.D1:time.D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следовательная</text:p>
                <draw:g>
                  <svg:desc>time.B1:time.B1</svg:desc>
                </draw:g>
              </table:table-cell>
              <table:table-cell office:value-type="string">
                <text:p>Точка-точка</text:p>
                <draw:g>
                  <svg:desc>time.C1:time.C1</svg:desc>
                </draw:g>
              </table:table-cell>
              <table:table-cell office:value-type="string">
                <text:p>Коллективная</text:p>
                <draw:g>
                  <svg:desc>time.D1:time.D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time.A2:time.A6</svg:desc>
                </draw:g>
              </table:table-cell>
              <table:table-cell office:value-type="float" office:value="46.71672">
                <text:p>46.71672</text:p>
                <draw:g>
                  <svg:desc>time.B2:time.B6</svg:desc>
                </draw:g>
              </table:table-cell>
              <table:table-cell office:value-type="float" office:value="23.579874">
                <text:p>23.579874</text:p>
                <draw:g>
                  <svg:desc>time.C2:time.C6</svg:desc>
                </draw:g>
              </table:table-cell>
              <table:table-cell office:value-type="float" office:value="23.777554">
                <text:p>23.777554</text:p>
                <draw:g>
                  <svg:desc>time.D2:time.D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6.71672">
                <text:p>46.71672</text:p>
              </table:table-cell>
              <table:table-cell office:value-type="float" office:value="11.917045">
                <text:p>11.917045</text:p>
              </table:table-cell>
              <table:table-cell office:value-type="float" office:value="11.90936">
                <text:p>11.9093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6.71672">
                <text:p>46.71672</text:p>
              </table:table-cell>
              <table:table-cell office:value-type="float" office:value="6.247741">
                <text:p>6.247741</text:p>
              </table:table-cell>
              <table:table-cell office:value-type="float" office:value="6.234545">
                <text:p>6.23454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6.71672">
                <text:p>46.71672</text:p>
              </table:table-cell>
              <table:table-cell office:value-type="float" office:value="5.044346">
                <text:p>5.044346</text:p>
              </table:table-cell>
              <table:table-cell office:value-type="float" office:value="5.00678">
                <text:p>5.0067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6.71672">
                <text:p>46.71672</text:p>
              </table:table-cell>
              <table:table-cell office:value-type="float" office:value="3.631974">
                <text:p>3.631974</text:p>
              </table:table-cell>
              <table:table-cell office:value-type="float" office:value="3.634103">
                <text:p>3.6341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Dash_20__28_Rounded_29_" draw:display-name="Dash (Rounded)" draw:style="round" draw:dots1="1" draw:dots1-length="201%" draw:distance="199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_20__28_Rounded_29_" svg:stroke-width="0.08cm" svg:stroke-color="#ffd320" svg:stroke-linecap="round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2pt" style:font-size-asian="9pt" style:font-size-complex="9pt"/>
    </style:style>
  </office:automatic-styles>
  <office:body>
    <office:chart>
      <chart:chart svg:width="20.136cm" svg:height="11.326cm" xlink:href=".." xlink:type="simple" chart:class="chart:line" chart:style-name="ch1">
        <chart:title svg:x="6.729cm" svg:y="0.362cm" chart:style-name="ch2">
          <text:p>График ускорения выполнения</text:p>
        </chart:title>
        <chart:legend chart:legend-position="top" svg:x="3.563cm" svg:y="1.326cm" style:legend-expansion="wide" chart:style-name="ch3"/>
        <chart:plot-area chart:style-name="ch4" svg:x="1.557cm" svg:y="2.15cm" svg:width="18.177cm" svg:height="7.825cm">
          <chart:coordinate-region svg:x="2.191cm" svg:y="2.349cm" svg:width="17.35cm" svg:height="6.979cm"/>
          <chart:axis chart:dimension="x" chart:name="primary-x" chart:style-name="ch5" chartooo:axis-type="auto">
            <chartooo:date-scale/>
            <chart:title svg:x="8.873cm" svg:y="10.201cm" chart:style-name="ch2">
              <text:p><text:span text:style-name="T1">Число процессов</text:span></text:p>
            </chart:title>
            <chart:categories table:cell-range-address="time.A8:time.A12"/>
          </chart:axis>
          <chart:axis chart:dimension="y" chart:name="primary-y" chart:style-name="ch5">
            <chart:title svg:x="0.451cm" svg:y="8.591cm" chart:style-name="ch6">
              <text:p><text:span text:style-name="T1">Коэффициент ускорения</text:span></text:p>
            </chart:title>
            <chart:grid chart:style-name="ch7" chart:class="major"/>
          </chart:axis>
          <chart:series chart:style-name="ch8" chart:values-cell-range-address="time.B8:time.B12" chart:label-cell-address="time.B7:time.B7" chart:class="chart:line">
            <chart:data-point chart:repeated="5"/>
          </chart:series>
          <chart:series chart:style-name="ch9" chart:values-cell-range-address="time.C8:time.C12" chart:label-cell-address="time.C7:time.C7" chart:class="chart:line">
            <chart:data-point chart:repeated="5"/>
          </chart:series>
          <chart:series chart:style-name="ch10" chart:values-cell-range-address="time.D8:time.D12" chart:label-cell-address="time.D7:time.D7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следовательная</text:p>
                <draw:g>
                  <svg:desc>time.B7:time.B7</svg:desc>
                </draw:g>
              </table:table-cell>
              <table:table-cell office:value-type="string">
                <text:p>Точка-точка</text:p>
                <draw:g>
                  <svg:desc>time.C7:time.C7</svg:desc>
                </draw:g>
              </table:table-cell>
              <table:table-cell office:value-type="string">
                <text:p>Коллективная</text:p>
                <draw:g>
                  <svg:desc>time.D7:time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time.A8:time.A12</svg:desc>
                </draw:g>
              </table:table-cell>
              <table:table-cell office:value-type="float" office:value="1">
                <text:p>1</text:p>
                <draw:g>
                  <svg:desc>time.B8:time.B12</svg:desc>
                </draw:g>
              </table:table-cell>
              <table:table-cell office:value-type="float" office:value="1.981211">
                <text:p>1.981211</text:p>
                <draw:g>
                  <svg:desc>time.C8:time.C12</svg:desc>
                </draw:g>
              </table:table-cell>
              <table:table-cell office:value-type="float" office:value="1.96474">
                <text:p>1.96474</text:p>
                <draw:g>
                  <svg:desc>time.D8:time.D1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.920159">
                <text:p>3.920159</text:p>
              </table:table-cell>
              <table:table-cell office:value-type="float" office:value="3.922689">
                <text:p>3.9226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.477377">
                <text:p>7.477377</text:p>
              </table:table-cell>
              <table:table-cell office:value-type="float" office:value="7.493204">
                <text:p>7.4932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9.261204">
                <text:p>9.261204</text:p>
              </table:table-cell>
              <table:table-cell office:value-type="float" office:value="9.330691">
                <text:p>9.33069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2.862625">
                <text:p>12.862625</text:p>
              </table:table-cell>
              <table:table-cell office:value-type="float" office:value="12.855089">
                <text:p>12.8550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Dash_20__28_Rounded_29_" draw:display-name="Dash (Rounded)" draw:style="round" draw:dots1="1" draw:dots1-length="201%" draw:distance="199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_20__28_Rounded_29_" svg:stroke-width="0.08cm" svg:stroke-color="#ffd320" svg:stroke-linecap="round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2pt" style:font-size-asian="9pt" style:font-size-complex="9pt"/>
    </style:style>
    <style:style style:name="T2" style:family="text">
      <style:text-properties style:text-position="0% 100%" fo:font-size="11pt" style:letter-kerning="false" style:font-size-asian="9pt" style:font-size-complex="9pt"/>
    </style:style>
  </office:automatic-styles>
  <office:body>
    <office:chart>
      <chart:chart svg:width="19.971cm" svg:height="11.234cm" xlink:href=".." xlink:type="simple" chart:class="chart:line" chart:style-name="ch1">
        <chart:title svg:x="6.069cm" svg:y="0.36cm" chart:style-name="ch2">
          <text:p>График эффективности выполнения</text:p>
        </chart:title>
        <chart:legend chart:legend-position="top" svg:x="3.48cm" svg:y="1.324cm" style:legend-expansion="wide" chart:style-name="ch3"/>
        <chart:plot-area chart:style-name="ch4" svg:x="1.532cm" svg:y="2.146cm" svg:width="18.04cm" svg:height="7.739cm">
          <chart:coordinate-region svg:x="2.357cm" svg:y="2.345cm" svg:width="17.022cm" svg:height="6.893cm"/>
          <chart:axis chart:dimension="x" chart:name="primary-x" chart:style-name="ch5" chartooo:axis-type="auto">
            <chartooo:date-scale/>
            <chart:title svg:x="8.78cm" svg:y="10.109cm" chart:style-name="ch2">
              <text:p><text:span text:style-name="T1">Число процессов</text:span></text:p>
            </chart:title>
            <chart:categories table:cell-range-address="time.A14:time.A18"/>
          </chart:axis>
          <chart:axis chart:dimension="y" chart:name="primary-y" chart:style-name="ch5">
            <chart:title svg:x="0.451cm" svg:y="10.405cm" chart:style-name="ch6">
              <text:p><text:span text:style-name="T2">Эффективность использования процессов (%)</text:span></text:p>
            </chart:title>
            <chart:grid chart:style-name="ch7" chart:class="major"/>
          </chart:axis>
          <chart:series chart:style-name="ch8" chart:values-cell-range-address="time.B14:time.B18" chart:label-cell-address="time.B13:time.B13" chart:class="chart:line">
            <chart:data-point chart:repeated="5"/>
          </chart:series>
          <chart:series chart:style-name="ch9" chart:values-cell-range-address="time.C14:time.C18" chart:label-cell-address="time.C13:time.C13" chart:class="chart:line">
            <chart:data-point chart:repeated="5"/>
          </chart:series>
          <chart:series chart:style-name="ch10" chart:values-cell-range-address="time.D14:time.D18" chart:label-cell-address="time.D13:time.D13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следовательная</text:p>
                <draw:g>
                  <svg:desc>time.B13:time.B13</svg:desc>
                </draw:g>
              </table:table-cell>
              <table:table-cell office:value-type="string">
                <text:p>Точка-точка</text:p>
                <draw:g>
                  <svg:desc>time.C13:time.C13</svg:desc>
                </draw:g>
              </table:table-cell>
              <table:table-cell office:value-type="string">
                <text:p>Коллективная</text:p>
                <draw:g>
                  <svg:desc>time.D13:time.D1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time.A14:time.A18</svg:desc>
                </draw:g>
              </table:table-cell>
              <table:table-cell office:value-type="float" office:value="100">
                <text:p>100</text:p>
                <draw:g>
                  <svg:desc>time.B14:time.B18</svg:desc>
                </draw:g>
              </table:table-cell>
              <table:table-cell office:value-type="float" office:value="99.0605">
                <text:p>99.0605</text:p>
                <draw:g>
                  <svg:desc>time.C14:time.C18</svg:desc>
                </draw:g>
              </table:table-cell>
              <table:table-cell office:value-type="float" office:value="98.237">
                <text:p>98.237</text:p>
                <draw:g>
                  <svg:desc>time.D14:time.D1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98.0039">
                <text:p>98.0039</text:p>
              </table:table-cell>
              <table:table-cell office:value-type="float" office:value="98.0672">
                <text:p>98.06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93.4672">
                <text:p>93.4672</text:p>
              </table:table-cell>
              <table:table-cell office:value-type="float" office:value="93.665">
                <text:p>93.66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57.8825">
                <text:p>57.8825</text:p>
              </table:table-cell>
              <table:table-cell office:value-type="float" office:value="58.3168">
                <text:p>58.316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.166666">
                <text:p>4.166666</text:p>
              </table:table-cell>
              <table:table-cell office:value-type="float" office:value="53.5942">
                <text:p>53.5942</text:p>
              </table:table-cell>
              <table:table-cell office:value-type="float" office:value="53.5628">
                <text:p>53.56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Dash_20__28_Rounded_29_" draw:display-name="Dash (Rounded)" draw:style="round" draw:dots1="1" draw:dots1-length="201%" draw:distance="199%"/>
  </office:styles>
</office:document-styles>
</file>